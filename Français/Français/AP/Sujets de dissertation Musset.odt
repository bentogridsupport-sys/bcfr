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, Arial, Tahoma, Verdan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Helvetica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4pt" fo:letter-spacing="normal" fo:font-style="normal" fo:font-weight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ujets de dissertation sur Musset</text:span></text:p>
      <text:p text:style-name="P1"><text:span text:style-name="T1"/></text:p>
      <text:p text:style-name="P1"><text:span text:style-name="T1"/></text:p>
      <text:p text:style-name="P1"><text:span text:style-name="T1">Sujet 1 :</text:span> Jeanne Bern, une critique littéraire, a affirmé concernant On ne badine pas avec l’amour : « La pièce commence comme une farce, se poursuit comme un marivaudage, devient sérieuse dans le grand duo central et se termine en tragédie. »<text:line-break/>Dans quelle mesure ces propos confirment-ils votre lecture de l’œuvre ? <text:line-break/> </text:p>
      <text:p text:style-name="P1"><text:span text:style-name="T1">Sujet 2 :</text:span> Selon vous, le titre de Marivaux Le Jeu de l’amour et du hasard conviendrait-il également à la pièce de Musset ?<text:line-break/>Vous répondrez à cette question dans un développement organisé en vous appuyant sur la pièce d’Alfred de Musset.<text:line-break/> </text:p>
      <text:p text:style-name="P1"><text:span text:style-name="T1">Sujet 3 :</text:span> La pièce On ne badine pas avec l’amour correspond-elle à un drame romantique ?<text:line-break/>Vous répondrez à cette question dans un développement organisé en vous appuyant sur la pièce d’Alfred de Musset ainsi que sur vos lectures personnelles.</text:p>
      <text:p text:style-name="P1"><text:line-break/><text:span text:style-name="T1">Sujet n°4 :</text:span> En quoi peut-on dire de Camille et de Perdican qu’ils badinent avec l’amour ?<text:line-break/>Vous répondrez à cette question dans un développement organisé en vous appuyant notamment sur l’œuvre de Musset, sur les textes du parcours ainsi que sur votre culture personnelle.<text:line-break/> </text:p>
      <text:p text:style-name="P1"><text:span text:style-name="T1">Sujet n°5 :</text:span> Dans quelle mesure peut-on dire des personnages d’On ne badine pas avec l’amour que tout ne ment pas en eux, même lorsque leur langue ment ?<text:line-break/>Vous répondrez à cette question dans un développement organisé en vous appuyant notamment sur l’œuvre de Musset, sur les textes du parcours ainsi que sur votre culture personnelle.<text:line-break/> </text:p>
      <text:p text:style-name="P1"><text:span text:style-name="T1">Sujet n°6 :</text:span> « Quelles vaines paroles, quelles misérables folies ont passé comme un vent funeste entre nous deux ? » s’interroge Perdican à la fin de la pièce. Dans On ne badine pas avec l’amour, ne parle-t-on que pour semer le malheur et la folie autour de soi ?<text:line-break/>Vous répondrez à cette question dans un développement organisé en vous appuyant sur votre lecture de l’œuv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, Arial, Tahoma, Verdan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6-01-23T10:57:09.24</meta:creation-date>
    <dc:date>2026-01-23T10:57:51.67</dc:date>
    <meta:editing-duration>PT42S</meta:editing-duration>
    <meta:editing-cycles>1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311" meta:character-count="1809"/>
  </office:meta>
</office:document-meta>
</file>