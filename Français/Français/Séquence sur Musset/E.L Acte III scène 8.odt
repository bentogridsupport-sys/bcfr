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.1111in" fo:line-height="200%"/>
      <style:text-properties style:font-name="Arial, sans-serif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margin-bottom="0.1111in" fo:line-height="200%"/>
      <style:text-properties style:font-name="Arial, sans-serif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margin-bottom="0.1111in" fo:line-height="200%"/>
    </style:style>
    <style:style style:name="P4" style:parent-style-name="Textbody" style:family="paragraph">
      <style:paragraph-properties fo:text-align="justify" fo:margin-bottom="0.1111in" fo:line-height="200%"/>
      <style:text-properties style:font-name="Arial, sans-serif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6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7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8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9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10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11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12" style:parent-style-name="Textbody" style:family="paragraph">
      <style:paragraph-properties fo:text-align="justify" fo:margin-bottom="0.1111in" fo:line-height="200%"/>
    </style:style>
    <style:style style:name="T13" style:parent-style-name="Policepardéfaut" style:family="text">
      <style:text-properties style:font-name="Arial, sans-serif"/>
    </style:style>
    <style:style style:name="T14" style:parent-style-name="Policepardéfaut" style:family="text">
      <style:text-properties style:font-name="Arial, sans-serif" fo:font-style="italic" style:font-style-asian="italic"/>
    </style:style>
    <style:style style:name="T15" style:parent-style-name="Policepardéfaut" style:family="text">
      <style:text-properties style:font-name="Arial, sans-serif"/>
    </style:style>
    <style:style style:name="T16" style:parent-style-name="Policepardéfaut" style:family="text">
      <style:text-properties style:font-name="Arial, sans-serif" fo:font-style="italic" style:font-style-asian="italic"/>
    </style:style>
    <style:style style:name="T17" style:parent-style-name="Policepardéfaut" style:family="text">
      <style:text-properties style:font-name="Arial, sans-serif"/>
    </style:style>
    <style:style style:name="P18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19" style:parent-style-name="Textbody" style:family="paragraph">
      <style:paragraph-properties fo:text-align="justify" fo:margin-bottom="0.1111in" fo:line-height="200%"/>
    </style:style>
    <style:style style:name="P20" style:parent-style-name="Textbody" style:family="paragraph">
      <style:paragraph-properties fo:text-align="justify" fo:margin-bottom="0.1111in" fo:line-height="200%"/>
    </style:style>
    <style:style style:name="P21" style:parent-style-name="Textbody" style:family="paragraph">
      <style:paragraph-properties fo:text-align="justify" fo:margin-bottom="0.1111in" fo:line-height="200%"/>
    </style:style>
    <style:style style:name="P22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23" style:parent-style-name="Textbody" style:family="paragraph">
      <style:paragraph-properties fo:text-align="justify" fo:margin-bottom="0.1111in" fo:line-height="200%"/>
    </style:style>
    <style:style style:name="T24" style:parent-style-name="Policepardéfaut" style:family="text">
      <style:text-properties style:font-name="Arial, sans-serif"/>
    </style:style>
    <style:style style:name="T25" style:parent-style-name="Policepardéfaut" style:family="text">
      <style:text-properties style:font-name="Arial, sans-serif" fo:font-style="italic" style:font-style-asian="italic"/>
    </style:style>
    <style:style style:name="T26" style:parent-style-name="Policepardéfaut" style:family="text">
      <style:text-properties style:font-name="Arial, sans-serif"/>
    </style:style>
    <style:style style:name="T27" style:parent-style-name="Policepardéfaut" style:family="text">
      <style:text-properties style:font-name="Arial, sans-serif" style:text-position="33.3% 100%"/>
    </style:style>
    <style:style style:name="T28" style:parent-style-name="Policepardéfaut" style:family="text">
      <style:text-properties style:font-name="Arial, sans-serif"/>
    </style:style>
    <style:style style:name="T29" style:parent-style-name="Policepardéfaut" style:family="text">
      <style:text-properties style:font-name="Arial, sans-serif"/>
    </style:style>
    <style:style style:name="P30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1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2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3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4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5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6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7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8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39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40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41" style:parent-style-name="Textbody" style:family="paragraph">
      <style:paragraph-properties fo:text-align="justify" fo:margin-bottom="0.1111in" fo:line-height="200%"/>
      <style:text-properties style:font-name="Arial, sans-serif"/>
    </style:style>
    <style:style style:name="P42" style:parent-style-name="Textbody" style:family="paragraph">
      <style:paragraph-properties fo:text-align="justify" fo:line-height="200%"/>
      <style:text-properties style:font-name="Arial, sans-serif"/>
    </style:style>
    <style:style style:name="P43" style:parent-style-name="Textbody" style:family="paragraph">
      <style:paragraph-properties fo:text-align="justify" fo:line-height="200%"/>
      <style:text-properties style:font-name="Arial, sans-serif"/>
    </style:style>
    <style:style style:name="P44" style:parent-style-name="Textbody" style:family="paragraph">
      <style:paragraph-properties fo:text-align="justify" fo:line-height="200%"/>
      <style:text-properties style:font-name="Arial, sans-serif"/>
    </style:style>
    <style:style style:name="P45" style:parent-style-name="Textbody" style:family="paragraph">
      <style:paragraph-properties fo:text-align="justify" fo:line-height="200%"/>
      <style:text-properties style:font-name="Arial, sans-serif"/>
    </style:style>
    <style:style style:name="P46" style:parent-style-name="Textbody" style:family="paragraph">
      <style:paragraph-properties fo:text-align="justify" fo:line-height="200%"/>
      <style:text-properties style:font-name="Arial, sans-serif"/>
    </style:style>
    <style:style style:name="P47" style:parent-style-name="Textbody" style:family="paragraph">
      <style:paragraph-properties fo:text-align="justify" fo:line-height="200%"/>
      <style:text-properties style:font-name="Arial, sans-serif"/>
    </style:style>
    <style:style style:name="P48" style:parent-style-name="Textbody" style:family="paragraph">
      <style:paragraph-properties fo:text-align="justify" fo:line-height="200%"/>
      <style:text-properties style:font-name="Arial, sans-serif"/>
    </style:style>
    <style:style style:name="P49" style:parent-style-name="Textbody" style:family="paragraph">
      <style:paragraph-properties fo:text-align="justify" fo:line-height="200%"/>
      <style:text-properties style:font-name="Arial, sans-serif"/>
    </style:style>
    <style:style style:name="P50" style:parent-style-name="Textbody" style:family="paragraph">
      <style:paragraph-properties fo:text-align="justify" fo:line-height="200%"/>
      <style:text-properties style:font-name="Arial, sans-serif"/>
    </style:style>
    <style:style style:name="P51" style:parent-style-name="Textbody" style:family="paragraph">
      <style:paragraph-properties fo:text-align="justify" fo:line-height="200%"/>
      <style:text-properties style:font-name="Arial, sans-serif"/>
    </style:style>
    <style:style style:name="P52" style:parent-style-name="Textbody" style:family="paragraph">
      <style:paragraph-properties fo:text-align="justify" fo:line-height="200%"/>
      <style:text-properties style:font-name="Arial, sans-serif"/>
    </style:style>
    <style:style style:name="P53" style:parent-style-name="Textbody" style:family="paragraph">
      <style:paragraph-properties fo:text-align="justify" fo:line-height="200%"/>
      <style:text-properties style:font-name="Arial, sans-serif"/>
    </style:style>
    <style:style style:name="P54" style:parent-style-name="Textbody" style:family="paragraph">
      <style:paragraph-properties fo:text-align="justify" fo:line-height="200%"/>
      <style:text-properties style:font-name="Arial, sans-serif"/>
    </style:style>
    <style:style style:name="P55" style:parent-style-name="Textbody" style:family="paragraph">
      <style:paragraph-properties fo:text-align="justify" fo:line-height="200%"/>
      <style:text-properties style:font-name="Arial, sans-serif"/>
    </style:style>
    <style:style style:name="P56" style:parent-style-name="Textbody" style:family="paragraph">
      <style:paragraph-properties fo:text-align="justify" fo:line-height="200%"/>
      <style:text-properties style:font-name="Arial, sans-serif"/>
    </style:style>
    <style:style style:name="P57" style:parent-style-name="Textbody" style:family="paragraph">
      <style:paragraph-properties fo:text-align="justify" fo:line-height="200%"/>
      <style:text-properties style:font-name="Arial, sans-serif"/>
    </style:style>
    <style:style style:name="P58" style:parent-style-name="Textbody" style:family="paragraph">
      <style:paragraph-properties fo:text-align="justify" fo:line-height="200%"/>
      <style:text-properties style:font-name="Arial, sans-serif"/>
    </style:style>
    <style:style style:name="P59" style:parent-style-name="Textbody" style:family="paragraph">
      <style:paragraph-properties fo:text-align="justify" fo:line-height="200%"/>
      <style:text-properties style:font-name="Arial, sans-serif"/>
    </style:style>
    <style:style style:name="P60" style:parent-style-name="Textbody" style:family="paragraph">
      <style:paragraph-properties fo:text-align="justify" fo:line-height="200%"/>
      <style:text-properties style:font-name="Arial, sans-serif"/>
    </style:style>
    <style:style style:name="P61" style:parent-style-name="Textbody" style:family="paragraph">
      <style:paragraph-properties fo:text-align="justify" fo:line-height="200%"/>
      <style:text-properties style:font-name="Arial, sans-serif"/>
    </style:style>
  </office:automatic-styles>
  <office:body>
    <office:text text:use-soft-page-breaks="true">
      <text:p text:style-name="P1">Explication linéaire n°7</text:p>
      <text:p text:style-name="P2">Acte III, scène 8 : le dénouement</text:p>
      <text:p text:style-name="P3"> </text:p>
      <text:p text:style-name="P4">Introduction</text:p>
      <text:p text:style-name="P5">Auteur/Mouvement/Œuvre</text:p>
      <text:p text:style-name="P6">Situation du texte : Dans la scène finale, alors que Perdican s’obstine à vouloir<text:s/>épouser Rosette, Camille se réfugie dans l’oratoire (lieu propice aux confessions, à la confrontation avec soi-même). Chacun reconnaît son erreur et son mensonge. Ils s’avouent enfin leur amour, moment tant attendu mais éphémère car la scène va basculer brutalement dans la tragédie.</text:p>
      <text:p text:style-name="P7">Problématique :</text:p>
      <text:p text:style-name="P8">En quoi ce dénouement révèle-t-il la dimension tragique du badinage amoureux ?</text:p>
      <text:p text:style-name="P9">Comment le dénouement fait-il basculer la comédie dans le tragique ?</text:p>
      <text:p text:style-name="P10">Plan :</text:p>
      <text:p text:style-name="P11">I – L’aveu de l’amour réciproque (jusqu’à « Chère créature, tu es à moi ! »)</text:p>
      <text:p text:style-name="P12"><text:span text:style-name="T13">II – Un coup de théâtre (de<text:s/></text:span><text:span text:style-name="T14">Il l’embrasse<text:s/></text:span><text:span text:style-name="T15">à<text:s/></text:span><text:span text:style-name="T16">Camille sort.</text:span><text:span text:style-name="T17">)</text:span></text:p>
      <text:p text:style-name="P18">III – Un dénouement tragique</text:p>
      <text:p text:style-name="P19"> </text:p>
      <text:p text:style-name="P20"> </text:p>
      <text:p text:style-name="P21"> </text:p>
      <text:p text:style-name="P22">II – Un coup de théâtre</text:p>
      <text:p text:style-name="P23"><text:span text:style-name="T24">« </text:span><text:span text:style-name="T25">On entend un grand cri derrière l’autel »</text:span><text:span text:style-name="T26"> : 3</text:span><text:span text:style-name="T27">ème</text:span><text:span text:style-name="T28"><text:s/>scène avec un témoin caché (info donnée par la<text:s/></text:span><text:soft-page-break/><text:span text:style-name="T29">didascalie)</text:span></text:p>
      <text:p text:style-name="P30">C et P, comme les spect ne savent pas que Rosette les épiait et était cachée : surprise, on est en empathie avec les perso : on se réjouit et on souffre en même tps qu’eux</text:p>
      <text:p text:style-name="P31">« un grand cri » : GN + verbe entendre : perception sonore et non visuelle : moment de<text:s/>tension tragique qui entretient le suspense</text:p>
      <text:p text:style-name="P32">« C’est la voix de ma sœur de lait…</text:p>
      <text:p text:style-name="P33">Comment est-elle ici ?... : échange de répliques rapides, courtes, informatives : affolement</text:p>
      <text:p text:style-name="P34">- « je l’avais laissée » : matérialise Rosette de façon implicite, suggestive</text:p>
      <text:p text:style-name="P35">« il<text:s/>faut donc qu’elle m’ait suivi » : tournure impersonnelle d’obligation + donc, conj de coordination à valeur de conséquence : se déresponsabilise = ce n’est pas sa faute !</text:p>
      <text:p text:style-name="P36">« Je ne sais ce que j’éprouve, il me semble que mes mains sont couvertes de sang » :</text:p>
      <text:p text:style-name="P37">Prémonitions, pressentiments de Perd sur la fin tragique : « il me semble » : verbe a un sens prémonitoire de rêve</text:p>
      <text:p text:style-name="P38">- début du ch lex de la mort (sang, froid mortel, meurtrier, mort, tuez) qui va dominer (s’oppose au ch lex de l’amour)</text:p>
      <text:p text:style-name="P39">- mains couvertes de<text:s/>sang : symbole de la culpabilité</text:p>
      <text:p text:style-name="P40">- « la pauvre enfant » : registre pathétique (pauvre, évanouie, portons-lui secours, hélas) : pitié, compassion de Cam</text:p>
      <text:p text:style-name="P41">-« évanouie » : essaie de dédramatiser en cherchant  une explication rassurante</text:p>
      <text:p text:style-name="P42">- « entrons, viens,<text:s/>portons » : 3 impératifs : Cam prend les choses en main et cherche peut-être à réparer leurs erreurs</text:p>
      <text:p text:style-name="P43">Propositions juxtaposées (ou parataxe : absence de connecteurs logiques) : rythme rapide</text:p>
      <text:soft-page-break/>
      <text:p text:style-name="P44">« Non, je n’entrerai pas » : double négation : lâcheté de Perd (n’a ps la force d’assumer)</text:p>
      <text:p text:style-name="P45">« je sens un froid mortel qui me paralyse » : sent la mort s’emparer de lui / annonce le dénouement funeste</text:p>
      <text:p text:style-name="P46">« Vas-y Camille, et Tâche de la ramener » : 2 impératifs qui marquent le refus d’aider Cam + séparation physique du couple<text:s/>annoncée par la didascalie « Camille sort ».</text:p>
      <text:p text:style-name="P47">III –</text:p>
      <text:p text:style-name="P48">« Je vous en supplie mon Dieu ! » : exclamative + apostrophe à Dieu : implore et supplie Dieu / retour du registre élégiaque (sorte de lyrisme triste : plainte, regret)</text:p>
      <text:p text:style-name="P49">« ne faites pas de moi un meurtrier » : négation synt.totale + impératif à valeur de prière, de supplication pour éviter d’être tenu responsable, d’être « le meurtrier » (terme annonciateur)</text:p>
      <text:p text:style-name="P50">« Vous voyez ce qui se passe » : pronom vous : adresse directe à Dieu qu’il prend à témoin</text:p>
      <text:p text:style-name="P51">« nous sommes deux enfants insensés » : thème du caprice avec « enfants » + jeu « avons joué » (renvoie au badinage du titre)</text:p>
      <text:p text:style-name="P52">Reprise de l’adj « insensés » : oppose l’innocence de 2 enfants inconscients à la perspective d’être « un meurtrier »</text:p>
      <text:p text:style-name="P53">Aveu, concession des<text:s/>fautes / « mais «  notre cœur est pur » : tentative de justification</text:p>
      <text:p text:style-name="P54">« ne tuez pas Rosette, Dieu : juste ! » : exclamative + impératif de supplication + apostrophe à Dieu qui appuie sur le caractère tragique du dénouemt, qui le représente comme la fatalité<text:s/>ds l’Antiquité</text:p>
      <text:p text:style-name="P55">« Je lui trouverai un mari… » : rythme binaire puis ternaire, absence de connecteurs : prop juxtaposées (= parataxe) : accélération du rythme qui évoque l’affolement</text:p>
      <text:p text:style-name="P56">Emploi du futur (trouverai, réparerai, sera) : envisage la réparation de ses fautes comme une certitude</text:p>
      <text:p text:style-name="P57">« quatre de vos enfants » : illusion heureuse de 2 couples mariés : fin heureuse envisagée par Perd</text:p>
      <text:p text:style-name="P58">« Eh bien, qu’y a-t-il ? » : question très brève suivie de la dern réplique très rapide, réduite à son strict<text:s/><text:soft-page-break/>minimum (mots<text:s/>monosyllabiques) : rend la séparation définitive</text:p>
      <text:p text:style-name="P59">Conclusion</text:p>
      <text:p text:style-name="P60">Dans cette dernière scène, nous avons assisté à de multiples effets de surprise (plusieurs dénouements) qui ont conduit à un dénouement tragique. La structure de la scène repose sur un double coup<text:s/>de théâtre : l’union puis la désunion de Camille et Perdican. L’ironie de la pièce vient du fait que le bonheur qui était à portée de main leur est retiré brutalement. Le titre-proverbe prend tout son sens de mise en garde.</text:p>
      <text:p text:style-name="P61">Ce dénouemt tragique rappelle celui de Roméo et Juliette : alors que tous les obstacles st levés, ils se suicident suite à un malentendu. Comme chez Musset, le bonheur leur est retiré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CREMADES</dc:creator>
    <meta:creation-date>2026-01-22T16:27:00Z</meta:creation-date>
    <dc:date>2026-01-30T18:37:00Z</dc:date>
    <meta:template xlink:href="Normal" xlink:type="simple"/>
    <meta:editing-cycles>2</meta:editing-cycles>
    <meta:editing-duration>PT120S</meta:editing-duration>
    <meta:document-statistic meta:page-count="4" meta:paragraph-count="9" meta:word-count="758" meta:character-count="4921" meta:row-count="34" meta:non-whitespace-character-count="4172"/>
  </office:meta>
</office:document-meta>
</file>