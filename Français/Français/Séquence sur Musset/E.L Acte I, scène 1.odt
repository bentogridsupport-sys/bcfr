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Arial, sans-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Textbody" style:family="paragraph">
      <style:paragraph-properties fo:text-align="center"/>
      <style:text-properties style:font-name="Arial, sans-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Textbody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Textbody" style:family="paragraph">
      <style:paragraph-properties fo:text-align="justify"/>
      <style:text-properties style:font-name="Arial, sans-serif"/>
    </style:style>
    <style:style style:name="P5" style:parent-style-name="Textbody" style:family="paragraph">
      <style:paragraph-properties fo:text-align="justify"/>
      <style:text-properties style:font-name="Arial, sans-serif"/>
    </style:style>
    <style:style style:name="P6" style:parent-style-name="Textbody" style:family="paragraph">
      <style:paragraph-properties fo:text-align="justify"/>
    </style:style>
    <style:style style:name="P7" style:parent-style-name="Textbody" style:family="paragraph">
      <style:paragraph-properties fo:text-align="justify"/>
      <style:text-properties style:font-name="Arial, sans-serif"/>
    </style:style>
    <style:style style:name="P8" style:parent-style-name="Textbody" style:family="paragraph">
      <style:paragraph-properties fo:text-align="justify"/>
      <style:text-properties style:font-name="Arial, sans-serif"/>
    </style:style>
    <style:style style:name="P9" style:parent-style-name="Textbody" style:family="paragraph">
      <style:paragraph-properties fo:text-align="justify"/>
      <style:text-properties style:font-name="Arial, sans-serif"/>
    </style:style>
    <style:style style:name="P10" style:parent-style-name="Textbody" style:family="paragraph">
      <style:paragraph-properties fo:text-align="justify"/>
    </style:style>
    <style:style style:name="P11" style:parent-style-name="Textbody" style:family="paragraph">
      <style:paragraph-properties fo:text-align="justify"/>
      <style:text-properties style:font-name="Arial, sans-serif"/>
    </style:style>
    <style:style style:name="P12" style:parent-style-name="Textbody" style:family="paragraph">
      <style:paragraph-properties fo:text-align="justify"/>
    </style:style>
    <style:style style:name="P13" style:parent-style-name="Textbody" style:family="paragraph">
      <style:paragraph-properties fo:text-align="justify"/>
      <style:text-properties style:font-name="Arial, sans-serif"/>
    </style:style>
    <style:style style:name="P14" style:parent-style-name="Textbody" style:family="paragraph">
      <style:paragraph-properties fo:text-align="justify"/>
      <style:text-properties style:font-name="Arial, sans-serif"/>
    </style:style>
    <style:style style:name="P15" style:parent-style-name="Textbody" style:family="paragraph">
      <style:paragraph-properties fo:text-align="justify"/>
    </style:style>
    <style:style style:name="T16" style:parent-style-name="Policepardéfaut" style:family="text">
      <style:text-properties style:font-name="Arial, sans-serif"/>
    </style:style>
    <style:style style:name="T17" style:parent-style-name="Policepardéfaut" style:family="text">
      <style:text-properties style:font-name="Arial, sans-serif" style:text-position="33.3% 100%"/>
    </style:style>
    <style:style style:name="T18" style:parent-style-name="Policepardéfaut" style:family="text">
      <style:text-properties style:font-name="Arial, sans-serif"/>
    </style:style>
    <style:style style:name="T19" style:parent-style-name="Policepardéfaut" style:family="text">
      <style:text-properties style:font-name="Arial, sans-serif"/>
    </style:style>
    <style:style style:name="P20" style:parent-style-name="Textbody" style:family="paragraph">
      <style:paragraph-properties fo:text-align="justify"/>
      <style:text-properties style:font-name="Arial, sans-serif"/>
    </style:style>
    <style:style style:name="P21" style:parent-style-name="Textbody" style:family="paragraph">
      <style:paragraph-properties fo:text-align="justify"/>
      <style:text-properties style:font-name="Arial, sans-serif"/>
    </style:style>
    <style:style style:name="P22" style:parent-style-name="Textbody" style:family="paragraph">
      <style:paragraph-properties fo:text-align="justify"/>
      <style:text-properties style:font-name="Arial, sans-serif"/>
    </style:style>
    <style:style style:name="P23" style:parent-style-name="Textbody" style:family="paragraph">
      <style:paragraph-properties fo:text-align="justify"/>
      <style:text-properties style:font-name="Arial, sans-serif"/>
    </style:style>
    <style:style style:name="P24" style:parent-style-name="Textbody" style:family="paragraph">
      <style:paragraph-properties fo:text-align="justify"/>
      <style:text-properties style:font-name="Arial, sans-serif"/>
    </style:style>
    <style:style style:name="P25" style:parent-style-name="Textbody" style:family="paragraph">
      <style:paragraph-properties fo:text-align="justify"/>
    </style:style>
    <style:style style:name="P26" style:parent-style-name="Textbody" style:family="paragraph">
      <style:paragraph-properties fo:text-align="justify"/>
      <style:text-properties style:font-name="Arial, sans-serif"/>
    </style:style>
    <style:style style:name="P27" style:parent-style-name="Textbody" style:family="paragraph">
      <style:paragraph-properties fo:text-align="justify"/>
      <style:text-properties style:font-name="Arial, sans-serif"/>
    </style:style>
    <style:style style:name="P28" style:parent-style-name="Textbody" style:family="paragraph">
      <style:paragraph-properties fo:text-align="justify"/>
      <style:text-properties style:font-name="Arial, sans-serif"/>
    </style:style>
    <style:style style:name="P29" style:parent-style-name="Textbody" style:family="paragraph">
      <style:paragraph-properties fo:text-align="justify"/>
      <style:text-properties style:font-name="Arial, sans-serif"/>
    </style:style>
    <style:style style:name="P30" style:parent-style-name="Textbody" style:family="paragraph">
      <style:paragraph-properties fo:text-align="justify"/>
      <style:text-properties style:font-name="Arial, sans-serif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P34" style:parent-style-name="Textbody" style:family="paragraph">
      <style:paragraph-properties fo:text-align="justify"/>
    </style:style>
    <style:style style:name="P35" style:parent-style-name="Textbody" style:family="paragraph">
      <style:paragraph-properties fo:text-align="justify"/>
      <style:text-properties style:font-name="Arial, sans-serif"/>
    </style:style>
    <style:style style:name="P36" style:parent-style-name="Textbody" style:family="paragraph">
      <style:paragraph-properties fo:text-align="justify"/>
      <style:text-properties style:font-name="Arial, sans-serif"/>
    </style:style>
    <style:style style:name="P37" style:parent-style-name="Textbody" style:family="paragraph">
      <style:paragraph-properties fo:text-align="justify"/>
      <style:text-properties style:font-name="Arial, sans-serif"/>
    </style:style>
    <style:style style:name="P38" style:parent-style-name="Textbody" style:family="paragraph">
      <style:paragraph-properties fo:text-align="justify"/>
      <style:text-properties style:font-name="Arial, sans-serif"/>
    </style:style>
    <style:style style:name="P39" style:parent-style-name="Textbody" style:family="paragraph">
      <style:paragraph-properties fo:text-align="justify"/>
      <style:text-properties style:font-name="Arial, sans-serif"/>
    </style:style>
    <style:style style:name="P40" style:parent-style-name="Textbody" style:family="paragraph">
      <style:paragraph-properties fo:text-align="justify"/>
      <style:text-properties style:font-name="Arial, sans-serif"/>
    </style:style>
    <style:style style:name="P41" style:parent-style-name="Textbody" style:family="paragraph">
      <style:paragraph-properties fo:text-align="justify"/>
      <style:text-properties style:font-name="Arial, sans-serif"/>
    </style:style>
    <style:style style:name="P42" style:parent-style-name="Textbody" style:family="paragraph">
      <style:paragraph-properties fo:text-align="justify"/>
      <style:text-properties style:font-name="Arial, sans-serif"/>
    </style:style>
    <style:style style:name="P43" style:parent-style-name="Textbody" style:family="paragraph">
      <style:paragraph-properties fo:text-align="justify"/>
      <style:text-properties style:font-name="Arial, sans-serif"/>
    </style:style>
    <style:style style:name="P44" style:parent-style-name="Textbody" style:family="paragraph">
      <style:paragraph-properties fo:text-align="justify"/>
      <style:text-properties style:font-name="Arial, sans-serif"/>
    </style:style>
    <style:style style:name="P45" style:parent-style-name="Textbody" style:family="paragraph">
      <style:paragraph-properties fo:text-align="justify"/>
      <style:text-properties style:font-name="Arial, sans-serif"/>
    </style:style>
    <style:style style:name="P46" style:parent-style-name="Textbody" style:family="paragraph">
      <style:paragraph-properties fo:text-align="justify"/>
      <style:text-properties style:font-name="Arial, sans-serif"/>
    </style:style>
    <style:style style:name="P47" style:parent-style-name="Textbody" style:family="paragraph">
      <style:paragraph-properties fo:text-align="justify"/>
    </style:style>
    <style:style style:name="P48" style:parent-style-name="Textbody" style:family="paragraph">
      <style:paragraph-properties fo:text-align="justify"/>
      <style:text-properties style:font-name="Arial, sans-serif"/>
    </style:style>
    <style:style style:name="P49" style:parent-style-name="Textbody" style:family="paragraph">
      <style:paragraph-properties fo:text-align="justify"/>
      <style:text-properties style:font-name="Arial, sans-serif"/>
    </style:style>
    <style:style style:name="P50" style:parent-style-name="Textbody" style:family="paragraph">
      <style:paragraph-properties fo:text-align="justify"/>
      <style:text-properties style:font-name="Arial, sans-serif"/>
    </style:style>
    <style:style style:name="P51" style:parent-style-name="Textbody" style:family="paragraph">
      <style:paragraph-properties fo:text-align="justify"/>
      <style:text-properties style:font-name="Arial, sans-serif"/>
    </style:style>
    <style:style style:name="P52" style:parent-style-name="Textbody" style:family="paragraph">
      <style:paragraph-properties fo:text-align="justify"/>
      <style:text-properties style:font-name="Arial, sans-serif"/>
    </style:style>
    <style:style style:name="P53" style:parent-style-name="Textbody" style:family="paragraph">
      <style:paragraph-properties fo:text-align="justify"/>
      <style:text-properties style:font-name="Arial, sans-serif"/>
    </style:style>
    <style:style style:name="P54" style:parent-style-name="Textbody" style:family="paragraph">
      <style:paragraph-properties fo:text-align="justify"/>
      <style:text-properties style:font-name="Arial, sans-serif"/>
    </style:style>
    <style:style style:name="P55" style:parent-style-name="Textbody" style:family="paragraph">
      <style:paragraph-properties fo:text-align="justify"/>
      <style:text-properties style:font-name="Arial, sans-serif"/>
    </style:style>
    <style:style style:name="P56" style:parent-style-name="Textbody" style:family="paragraph">
      <style:paragraph-properties fo:text-align="justify"/>
      <style:text-properties style:font-name="Arial, sans-serif"/>
    </style:style>
    <style:style style:name="P57" style:parent-style-name="Textbody" style:family="paragraph">
      <style:paragraph-properties fo:text-align="justify"/>
      <style:text-properties style:font-name="Arial, sans-serif"/>
    </style:style>
    <style:style style:name="P58" style:parent-style-name="Textbody" style:family="paragraph">
      <style:paragraph-properties fo:text-align="justify"/>
      <style:text-properties style:font-name="Arial, sans-serif"/>
    </style:style>
    <style:style style:name="P59" style:parent-style-name="Textbody" style:family="paragraph">
      <style:paragraph-properties fo:text-align="justify"/>
      <style:text-properties style:font-name="Arial, sans-serif"/>
    </style:style>
    <style:style style:name="P60" style:parent-style-name="Textbody" style:family="paragraph">
      <style:paragraph-properties fo:text-align="justify"/>
      <style:text-properties style:font-name="Arial, sans-serif"/>
    </style:style>
    <style:style style:name="P61" style:parent-style-name="Textbody" style:family="paragraph">
      <style:paragraph-properties fo:text-align="justify"/>
      <style:text-properties style:font-name="Arial, sans-serif"/>
    </style:style>
    <style:style style:name="P62" style:parent-style-name="Textbody" style:family="paragraph">
      <style:paragraph-properties fo:text-align="justify"/>
      <style:text-properties style:font-name="Arial, sans-serif"/>
    </style:style>
    <style:style style:name="P63" style:parent-style-name="Textbody" style:family="paragraph">
      <style:paragraph-properties fo:text-align="justify"/>
    </style:style>
    <style:style style:name="T64" style:parent-style-name="Policepardéfaut" style:family="text">
      <style:text-properties style:font-name="Arial, sans-serif"/>
    </style:style>
    <style:style style:name="T65" style:parent-style-name="Policepardéfaut" style:family="text">
      <style:text-properties style:font-name="Arial, sans-serif"/>
    </style:style>
    <style:style style:name="T66" style:parent-style-name="Policepardéfaut" style:family="text">
      <style:text-properties style:font-name="Arial, sans-serif" style:text-position="33.3% 100%"/>
    </style:style>
    <style:style style:name="T67" style:parent-style-name="Policepardéfaut" style:family="text">
      <style:text-properties style:font-name="Arial, sans-serif"/>
    </style:style>
    <style:style style:name="P68" style:parent-style-name="Textbody" style:family="paragraph">
      <style:paragraph-properties fo:text-align="justify"/>
      <style:text-properties style:font-name="Arial, sans-serif"/>
    </style:style>
    <style:style style:name="P69" style:parent-style-name="Textbody" style:family="paragraph">
      <style:paragraph-properties fo:text-align="justify"/>
      <style:text-properties style:font-name="Arial, sans-serif"/>
    </style:style>
    <style:style style:name="P70" style:parent-style-name="Textbody" style:family="paragraph">
      <style:paragraph-properties fo:text-align="justify"/>
      <style:text-properties style:font-name="Arial, sans-serif"/>
    </style:style>
    <style:style style:name="P71" style:parent-style-name="Textbody" style:family="paragraph">
      <style:paragraph-properties fo:text-align="justify"/>
      <style:text-properties style:font-name="Arial, sans-serif"/>
    </style:style>
    <style:style style:name="P72" style:parent-style-name="Textbody" style:family="paragraph">
      <style:paragraph-properties fo:text-align="justify"/>
    </style:style>
    <style:style style:name="T73" style:parent-style-name="Policepardéfaut" style:family="text">
      <style:text-properties style:font-name="Arial, sans-serif"/>
    </style:style>
    <style:style style:name="T74" style:parent-style-name="Policepardéfaut" style:family="text">
      <style:text-properties style:font-name="Arial, sans-serif" style:text-position="33.3% 100%"/>
    </style:style>
    <style:style style:name="T75" style:parent-style-name="Policepardéfaut" style:family="text">
      <style:text-properties style:font-name="Arial, sans-serif"/>
    </style:style>
    <style:style style:name="P76" style:parent-style-name="Textbody" style:family="paragraph">
      <style:paragraph-properties fo:text-align="justify"/>
      <style:text-properties style:font-name="Arial, sans-serif"/>
    </style:style>
    <style:style style:name="P77" style:parent-style-name="Textbody" style:family="paragraph">
      <style:paragraph-properties fo:text-align="justify"/>
      <style:text-properties style:font-name="Arial, sans-serif"/>
    </style:style>
    <style:style style:name="P78" style:parent-style-name="Textbody" style:family="paragraph">
      <style:paragraph-properties fo:text-align="justify"/>
      <style:text-properties style:font-name="Arial, sans-serif"/>
    </style:style>
    <style:style style:name="P79" style:parent-style-name="Textbody" style:family="paragraph">
      <style:paragraph-properties fo:text-align="justify"/>
      <style:text-properties style:font-name="Arial, sans-serif"/>
    </style:style>
    <style:style style:name="P80" style:parent-style-name="Textbody" style:family="paragraph">
      <style:paragraph-properties fo:text-align="justify"/>
    </style:style>
    <style:style style:name="P81" style:parent-style-name="Textbody" style:family="paragraph">
      <style:paragraph-properties fo:text-align="justify"/>
      <style:text-properties style:font-name="Arial, sans-serif"/>
    </style:style>
    <style:style style:name="P82" style:parent-style-name="Textbody" style:family="paragraph">
      <style:paragraph-properties fo:text-align="justify"/>
      <style:text-properties style:font-name="Arial, sans-serif"/>
    </style:style>
    <style:style style:name="P83" style:parent-style-name="Textbody" style:family="paragraph">
      <style:paragraph-properties fo:text-align="justify"/>
      <style:text-properties style:font-name="Arial, sans-serif"/>
    </style:style>
    <style:style style:name="P84" style:parent-style-name="Textbody" style:family="paragraph">
      <style:paragraph-properties fo:text-align="justify"/>
      <style:text-properties style:font-name="Arial, sans-serif"/>
    </style:style>
    <style:style style:name="P85" style:parent-style-name="Textbody" style:family="paragraph">
      <style:paragraph-properties fo:text-align="justify"/>
    </style:style>
    <style:style style:name="T86" style:parent-style-name="Policepardéfaut" style:family="text">
      <style:text-properties style:font-name="Arial, sans-serif"/>
    </style:style>
    <style:style style:name="T87" style:parent-style-name="Policepardéfaut" style:family="text">
      <style:text-properties style:font-name="Arial, sans-serif" style:text-position="33.3% 100%"/>
    </style:style>
    <style:style style:name="T88" style:parent-style-name="Policepardéfaut" style:family="text">
      <style:text-properties style:font-name="Arial, sans-serif"/>
    </style:style>
    <style:style style:name="P89" style:parent-style-name="Textbody" style:family="paragraph">
      <style:paragraph-properties fo:text-align="justify"/>
      <style:text-properties style:font-name="Arial, sans-serif"/>
    </style:style>
    <style:style style:name="P90" style:parent-style-name="Textbody" style:family="paragraph">
      <style:paragraph-properties fo:text-align="justify"/>
      <style:text-properties style:font-name="Arial, sans-serif"/>
    </style:style>
    <style:style style:name="P91" style:parent-style-name="Textbody" style:family="paragraph">
      <style:paragraph-properties fo:text-align="justify"/>
    </style:style>
    <style:style style:name="P92" style:parent-style-name="Textbody" style:family="paragraph">
      <style:paragraph-properties fo:text-align="justify"/>
      <style:text-properties style:font-name="Arial, sans-serif"/>
    </style:style>
    <style:style style:name="P93" style:parent-style-name="Textbody" style:family="paragraph">
      <style:paragraph-properties fo:text-align="justify"/>
    </style:style>
    <style:style style:name="T94" style:parent-style-name="Policepardéfaut" style:family="text">
      <style:text-properties style:font-name="Arial, sans-serif"/>
    </style:style>
    <style:style style:name="T95" style:parent-style-name="Policepardéfaut" style:family="text">
      <style:text-properties style:font-name="Arial, sans-serif" style:text-position="33.3% 100%"/>
    </style:style>
    <style:style style:name="T96" style:parent-style-name="Policepardéfaut" style:family="text">
      <style:text-properties style:font-name="Arial, sans-serif"/>
    </style:style>
    <style:style style:name="T97" style:parent-style-name="Policepardéfaut" style:family="text">
      <style:text-properties style:font-name="Arial, sans-serif"/>
    </style:style>
    <style:style style:name="P98" style:parent-style-name="Textbody" style:family="paragraph">
      <style:paragraph-properties fo:text-align="justify"/>
    </style:style>
    <style:style style:name="T99" style:parent-style-name="Policepardéfaut" style:family="text">
      <style:text-properties style:font-name="Arial, sans-serif"/>
    </style:style>
    <style:style style:name="T100" style:parent-style-name="Policepardéfaut" style:family="text">
      <style:text-properties style:font-name="Arial, sans-serif"/>
    </style:style>
    <style:style style:name="T101" style:parent-style-name="Policepardéfaut" style:family="text">
      <style:text-properties style:font-name="Arial, sans-serif"/>
    </style:style>
    <style:style style:name="T102" style:parent-style-name="Policepardéfaut" style:family="text">
      <style:text-properties style:font-name="Arial, sans-serif"/>
    </style:style>
    <style:style style:name="T103" style:parent-style-name="Policepardéfaut" style:family="text">
      <style:text-properties style:font-name="Arial, sans-serif"/>
    </style:style>
    <style:style style:name="T104" style:parent-style-name="Policepardéfaut" style:family="text">
      <style:text-properties style:font-name="Arial, sans-serif" fo:font-style="italic" style:font-style-asian="italic"/>
    </style:style>
    <style:style style:name="P105" style:parent-style-name="Textbody" style:family="paragraph">
      <style:paragraph-properties fo:text-align="justify"/>
    </style:style>
    <style:style style:name="P106" style:parent-style-name="Textbody" style:family="paragraph">
      <style:paragraph-properties fo:text-align="justify"/>
    </style:style>
    <style:style style:name="P107" style:parent-style-name="Textbody" style:family="paragraph">
      <style:paragraph-properties fo:text-align="justify"/>
    </style:style>
    <style:style style:name="P108" style:parent-style-name="Textbody" style:family="paragraph">
      <style:paragraph-properties fo:text-align="justify"/>
    </style:style>
    <style:style style:name="P109" style:parent-style-name="Textbody" style:family="paragraph">
      <style:paragraph-properties fo:text-align="justify"/>
    </style:style>
    <style:style style:name="P110" style:parent-style-name="Textbody" style:family="paragraph">
      <style:paragraph-properties fo:text-align="justify"/>
    </style:style>
    <style:style style:name="P111" style:parent-style-name="Textbody" style:family="paragraph">
      <style:paragraph-properties fo:text-align="justify"/>
    </style:style>
    <style:style style:name="P112" style:parent-style-name="Textbody" style:family="paragraph">
      <style:paragraph-properties fo:text-align="justify"/>
    </style:style>
    <style:style style:name="P113" style:parent-style-name="Textbody" style:family="paragraph">
      <style:paragraph-properties fo:text-align="justify"/>
    </style:style>
    <style:style style:name="P114" style:parent-style-name="Textbody" style:family="paragraph">
      <style:paragraph-properties fo:text-align="justify"/>
    </style:style>
    <style:style style:name="P115" style:parent-style-name="Textbody" style:family="paragraph">
      <style:paragraph-properties fo:text-align="justify"/>
    </style:style>
    <style:style style:name="P116" style:parent-style-name="Textbody" style:family="paragraph">
      <style:paragraph-properties fo:text-align="justify"/>
    </style:style>
    <style:style style:name="P117" style:parent-style-name="Textbody" style:family="paragraph">
      <style:paragraph-properties fo:text-align="justify"/>
    </style:style>
    <style:style style:name="P118" style:parent-style-name="Textbody" style:family="paragraph">
      <style:paragraph-properties fo:text-align="justify"/>
    </style:style>
    <style:style style:name="P119" style:parent-style-name="Textbody" style:family="paragraph">
      <style:paragraph-properties fo:text-align="justify"/>
    </style:style>
    <style:style style:name="P120" style:parent-style-name="Textbody" style:family="paragraph">
      <style:paragraph-properties fo:text-align="justify"/>
    </style:style>
  </office:automatic-styles>
  <office:body>
    <office:text text:use-soft-page-breaks="true">
      <text:p text:style-name="P1">E.L 5</text:p>
      <text:p text:style-name="P2">La scène d’exposition</text:p>
      <text:p text:style-name="P3"> </text:p>
      <text:p text:style-name="P4">Les personnages</text:p>
      <text:p text:style-name="P5">- Le Chœur : parodie du Chœur du théâtre antique ( à l’origine, groupe qui commente l’action en dansant et en chantant), ici représenté<text:s/>par un groupe de villageois, il sert à commenter l’action, à la prédire et à faire rire.</text:p>
      <text:p text:style-name="P6"> </text:p>
      <text:p text:style-name="P7">- Maître Blazius : précepteur de Perdican, ecclésiastique</text:p>
      <text:p text:style-name="P8">- Dame Pluche : nourrice, gouvernante de Camille</text:p>
      <text:p text:style-name="P9">Personnages grotesques : des fantoches, des marionnettes</text:p>
      <text:p text:style-name="P10"> </text:p>
      <text:p text:style-name="P11">Intro</text:p>
      <text:p text:style-name="P12"> </text:p>
      <text:p text:style-name="P13">Auteur, mouvement, œuvre (écrite pr être lue et non jouée)</text:p>
      <text:p text:style-name="P14">Situation : début de la pièce = scène d’exposition qui présente les personnages principaux, l’action, le cadre spatio-temporel…rôle d’éclairer</text:p>
      <text:p text:style-name="P15"><text:span text:style-name="T16">Pbq : En quoi cette 1</text:span><text:span text:style-name="T17">ère</text:span><text:span text:style-name="T18"><text:s/>scène remplit-elle<text:s/></text:span><text:span text:style-name="T19">les fonctions d’une scène d’exposition ?</text:span></text:p>
      <text:p text:style-name="P20">En quoi cette scène d’exposition est-elle comique ?</text:p>
      <text:p text:style-name="P21">Plan :</text:p>
      <text:p text:style-name="P22">1) Portrait comique et ridicule de Blazius (l.1 à 9)</text:p>
      <text:p text:style-name="P23">2) Eloge de Perdican (l.10 à 22 )</text:p>
      <text:p text:style-name="P24">3) Retour à une réalité grotesque (22 à fin)</text:p>
      <text:p text:style-name="P25"> </text:p>
      <text:p text:style-name="P26">I – Portrait</text:p>
      <text:p text:style-name="P27">Faux<text:s/>éloge : portrait faussement mélioratif</text:p>
      <text:p text:style-name="P28">Nbrx points négatifs :</text:p>
      <text:p text:style-name="P29">- ch lex du sommeil : bercé, oreiller, se ballotte, yeux à demi-fermés : personnage paresseux, indolent</text:p>
      <text:p text:style-name="P30">- « mule fringante » : oxymore : manque de dignité / renvoie aux lourdes charges portées par l’animal : trivialité et aspect grotesque</text:p>
      <text:p text:style-name="P31"> </text:p>
      <text:p text:style-name="P32"> </text:p>
      <text:p text:style-name="P33"> </text:p>
      <text:p text:style-name="P34"> </text:p>
      <text:p text:style-name="P35">- « messer » : terme du Moyen-Age : moqueur</text:p>
      <text:p text:style-name="P36">« bluets fleuris » : (CCL) décor champêtre, bucolique en opposition avec Blazius : décor propre à l’univers des contes merveilleux : cadre idéalisé</text:p>
      <text:p text:style-name="P37">« vêtu de neuf », « l’écritoire au côté » : accessoires qui renvoient à sa fonction (précepteur religieux) :<text:s/><text:soft-page-break/>fier de son image : orgueil</text:p>
      <text:p text:style-name="P38">« comme un poupon sur l’oreiller » : comparaison dépréciative qui le ridiculise et renvoie au thème de la rondeur et du sommeil</text:p>
      <text:p text:style-name="P39">Ch<text:s/>lex de l’obésité : triple menton, ventre rebondi, + comp « pareil à une amphore antique » qui réifie (réification) l’homme à un objet : contenant pr l’alcool (rempli de vin) : renvoie à la rondeur et à l’alcool</text:p>
      <text:p text:style-name="P40">« marmotte un Pater Noster » : verbe dépréciatif, l’aspect digne spirituel perd de sa valeur : critique de la Religion et de ses membres ecclésiastiques</text:p>
      <text:p text:style-name="P41">« Salut… antique » : le Chœur ne le prend pas au sérieux : ironie</text:p>
      <text:p text:style-name="P42">« tps de la vendange » : autre réf au vin : suggère l’ivrognerie du perso (CCT)</text:p>
      <text:p text:style-name="P43">-<text:s/>« premièrement un verre de vin frais » : adv souligne la priorité : boire de l’alcool : préoccupation triviale (s’oppose au spirituel)</text:p>
      <text:p text:style-name="P44">«- « que ceux qui » : pr démonstr : adresse au Chœur et au lecteur/spect : double énonciation</text:p>
      <text:p text:style-name="P45">« m’apportent » : monnaie<text:s/>ses propos, sa révélation : perso intéressé</text:p>
      <text:p text:style-name="P46">« notre plus grande écuelle » : superlatif qui traduit la moquerie des villageois et l’ivrognerie de Blazius</text:p>
      <text:p text:style-name="P47"> </text:p>
      <text:p text:style-name="P48">II – Eloge de Perdican</text:p>
      <text:p text:style-name="P49">- « mes enfants » : GN avec dét poss. Indique de la condescendance = orgueilleux</text:p>
      <text:p text:style-name="P50">- portrait de Perdican : « jeune » : adj épithète : un héros inexpérimenté/fougueux/passionné</text:p>
      <text:p text:style-name="P51">« fils de notre seigneur » : apposition / périphrase : origine aristocratique, noble, héritier du domaine</text:p>
      <text:p text:style-name="P52">« sa majorité » : thème de la jeunesse + indépendance</text:p>
      <text:p text:style-name="P53">« docteur à Paris » : érudit, parcours exemplaire</text:p>
      <text:p text:style-name="P54">« que le jeune … » et « qu’il est… » : 2 prop sub complétives COD du verbe « saurez » : Blazius apporte des informations sur Perdican</text:p>
      <text:p text:style-name="P55">« aujourd’hui même au château » : cadre spatio-temporel posé</text:p>
      <text:p text:style-name="P56">« si<text:s/>belles et si fleuries » : adv intensif « si » renforce les adj et p.passé mélioratifs : atteint une perfection grâce à l’éducation reçue (= il a appris à bien parler)</text:p>
      <text:p text:style-name="P57">Champ lex de la parole : bouche, parler, répondre, dire… et du savoir : latin, livre d’or, parchemins… : érudit, intellectuel et un artiste</text:p>
      <text:p text:style-name="P58">« si … que » : prop sub de conséquence qui montre l’admiration de Blazius</text:p>
      <text:p text:style-name="P59">-« gracieuse » adj épithète mélioratif + métaphore élogieuse « un livre d’or »</text:p>
      <text:p text:style-name="P60">Noblesse de corps (beau physique) et de cœur</text:p>
      <text:p text:style-name="P61">« brin<text:s/>d’herbe », « du vent ou qu’il pleut » : savoir scientifique / « en latin » : savoir littéraire</text:p>
      <text:p text:style-name="P62">« il ne voit pas… qu’il ne vous dise » : cherche à montrer son savoir, paraît pédant (par contraste s’oppose à l’ignorance de Blazius)</text:p>
      <text:p text:style-name="P63"><text:span text:style-name="T64">« grands comme la porte qu</text:span><text:span text:style-name="T65">e voilà » : comparaison loufoque, désigne la 1</text:span><text:span text:style-name="T66">ère</text:span><text:span text:style-name="T67"><text:s/>chose qu’il voit</text:span></text:p>
      <text:p text:style-name="P68">« parchemins qu’il a coloriés » : culture livresque de Perd s’oppose au terme enfantin, scolaire « coloriés »</text:p>
      <text:p text:style-name="P69">« c’est un diamant fin » : métaphore laudative (qui est élogieuse) avec le voc<text:s/>des pierres précieuses<text:s/><text:soft-page-break/>(or, diamant)</text:p>
      <text:p text:style-name="P70">« Enfin » : connect logique annonce la conclusion du portrait + « des pieds à la tête » : expression qui récapitule : souligne la perfection de Perd / crée des attentes élevées</text:p>
      <text:p text:style-name="P71">« je viens annoncer à Monsieur le Baron » : le verbe sous-entend que le père connaît mal son fils : risque de se tromper dans l’avenir</text:p>
      <text:p text:style-name="P72"><text:span text:style-name="T73">« cela me fait… à moi » : répétition redondante du pr personnel de la 1</text:span><text:span text:style-name="T74">ère</text:span><text:span text:style-name="T75"><text:s/>p. : est prétentieux : s’attribue la réussite de Perd</text:span></text:p>
      <text:p text:style-name="P76">Comique grotesque, de farce avec du comique de geste « apportez une chaise », « sans me casser le cou »</text:p>
      <text:p text:style-name="P77">Retour à l’ivrognerie : adv « encore » marque la répétition</text:p>
      <text:p text:style-name="P78"/>
      <text:p text:style-name="P79">III – Retour à une réalité grotesque</text:p>
      <text:p text:style-name="P80"> </text:p>
      <text:p text:style-name="P81">- « buvez », « reprenez » : impératifs : le Chœur moqueur, participe à une scène joyeuse</text:p>
      <text:p text:style-name="P82">- « Puissions-nous retrouver l’enfant ds le cœur de l’homme ! » : tournure exclamative + subjonctif : souhait de retrouver le garçon naïf, pur, mais installe un doute qui présage une fin tragique</text:p>
      <text:p text:style-name="P83">- ridicule du perso et trivialité : boisson / côté manipulateur qui veut s’attirer les bonnes grâces du baron</text:p>
      <text:p text:style-name="P84">- arrivée de Dame Pluche : portrait à l’inverse de Blazius, en symétrie :</text:p>
      <text:p text:style-name="P85"><text:span text:style-name="T86">Parallélisme de constr parfait en opposition : 2</text:span><text:span text:style-name="T87">ème</text:span><text:span text:style-name="T88"><text:s/>portrait ridicule et grotesque</text:span></text:p>
      <text:p text:style-name="P89">Rondeur/ maigreur ; nonchalant/ côté acariâtre : transi, gourdine, trépignent, égratignent : verbes traduisent une colère, agressivité</text:p>
      <text:p text:style-name="P90">« chapelet » : collier qui sert à réciter des prières : apparaît comme une bigote (fausse croyante) : nouvelle critique de la religion.</text:p>
      <text:p text:style-name="P91"> </text:p>
      <text:p text:style-name="P92">Conclusion</text:p>
      <text:p text:style-name="P93"><text:span text:style-name="T94">Cette 1</text:span><text:span text:style-name="T95">ère</text:span><text:span text:style-name="T96"><text:s/>sc remplit bien les fonctions d’une scène d’exposition : elle présente les personnages principaux et donne les informations nécessaires pour comprendre l’intrigue à venir. Cette présentation évoque l’atmosphère joyeuse de la comédie, voire de la farce, et</text:span><text:span text:style-name="T97"><text:s/>l’on a hâte de rencontrer le perso idéal de Perdican. Cependant quelques indices laissent entrevoir des développements plus sombres (le chœur emprunté à la tragédie antique, perso grotesques un peu inquiétants).</text:span></text:p>
      <text:p text:style-name="P98"><text:span text:style-name="T99">Le mélange des registres comique et tragique</text:span><text:span text:style-name="T100"><text:s/>est l’</text:span><text:span text:style-name="T101">une des caractéristiques du drame</text:span><text:span text:style-name="T102"><text:s/>romantique</text:span><text:span text:style-name="T103"><text:s/>théorisé par Hugo dans sa préface de<text:s/></text:span><text:span text:style-name="T104">Cromwell.</text:span></text:p>
      <text:p text:style-name="P105"> </text:p>
      <text:p text:style-name="P106"> </text:p>
      <text:p text:style-name="P107"> </text:p>
      <text:p text:style-name="P108"> </text:p>
      <text:p text:style-name="P109"> </text:p>
      <text:p text:style-name="P110"> </text:p>
      <text:p text:style-name="P111"> </text:p>
      <text:soft-page-break/>
      <text:p text:style-name="P112"> </text:p>
      <text:p text:style-name="P113"> </text:p>
      <text:p text:style-name="P114"> </text:p>
      <text:p text:style-name="P115"> </text:p>
      <text:p text:style-name="P116"> </text:p>
      <text:p text:style-name="P117"> </text:p>
      <text:p text:style-name="P118"> </text:p>
      <text:p text:style-name="P119"> </text:p>
      <text:p text:style-name="P120"> 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CREMADES</dc:creator>
    <meta:creation-date>2026-01-22T16:32:00Z</meta:creation-date>
    <dc:date>2026-01-30T18:34:00Z</dc:date>
    <meta:template xlink:href="Normal" xlink:type="simple"/>
    <meta:editing-cycles>5</meta:editing-cycles>
    <meta:editing-duration>PT1200S</meta:editing-duration>
    <meta:document-statistic meta:page-count="4" meta:paragraph-count="12" meta:word-count="990" meta:character-count="6429" meta:row-count="45" meta:non-whitespace-character-count="5451"/>
  </office:meta>
</office:document-meta>
</file>